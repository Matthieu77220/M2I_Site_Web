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s://github.com/Matthieu77220/M2I_Site_Web" office:target-frame-name="_top" xlink:show="replace"><text:span text:style-name="Lienhypertexte">https://github.com/Matthieu77220/M2I_Site_Web</text:span></text:a></text:p>
      <text:p text:style-name="Normal"><text:a xlink:href="https://trello.com/b/GbgxqfXy/mon-tableau-trello" office:target-frame-name="_top" xlink:show="replace"><text:span text:style-name="Lienhypertexte">https://trello.com/b/GbgxqfXy/mon-tableau-trello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thieu DIETRICH</meta:initial-creator>
    <dc:creator>Matthieu DIETRICH</dc:creator>
    <meta:creation-date>2025-10-01T14:24:00Z</meta:creation-date>
    <dc:date>2025-10-01T14:25:00Z</dc:date>
    <meta:template xlink:href="Normal" xlink:type="simple"/>
    <meta:editing-cycles>1</meta:editing-cycles>
    <meta:editing-duration>PT0S</meta:editing-duration>
    <meta:document-statistic meta:page-count="1" meta:paragraph-count="1" meta:word-count="33" meta:character-count="218" meta:row-count="1" meta:non-whitespace-character-count="186"/>
  </office:meta>
</office:document-meta>
</file>